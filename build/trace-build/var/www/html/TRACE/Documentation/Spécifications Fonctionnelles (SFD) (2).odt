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Heading_20_2">
      <style:paragraph-properties fo:margin-top="0in" fo:margin-bottom="0.0835in" loext:contextual-spacing="false" fo:line-height="114%" fo:padding="0in" fo:border="none"/>
    </style:style>
    <style:style style:name="P3" style:family="paragraph" style:parent-style-name="Heading_20_1" style:master-page-name="Standard">
      <style:paragraph-properties fo:margin-top="0in" fo:margin-bottom="0.0835in" loext:contextual-spacing="false" fo:line-height="114%" style:page-number="1" fo:padding="0in" fo:border="none"/>
    </style:style>
    <style:style style:name="P4" style:family="paragraph" style:parent-style-name="Heading_20_3">
      <style:paragraph-properties fo:margin-top="0in" fo:margin-bottom="0.0835in" loext:contextual-spacing="false" fo:line-height="114%" fo:padding="0in" fo:border="none"/>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fo:font-weight="bold" style:font-name-asian="Google Sans1" style:font-weight-asian="bold" style:font-name-complex="Google Sans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Dossier de Spécifications Fonctionnelles Détaillées (SFD)</text:span></text:p>
      <text:p text:style-name="P1"><text:span text:style-name="T2">Projet :</text:span><text:span text:style-name="T1"> mobiTrace (Traçabilité, Réemploi et Affectation Circulaire des Équipements)</text:span></text:p>
      <text:p text:style-name="P1"><text:span text:style-name="T2">Version :</text:span><text:span text:style-name="T1"> 2.0 (Intégration PWA TRACE-SCAN)</text:span></text:p>
      <text:p text:style-name="P1"><text:span text:style-name="T1">Ce document décrit les interactions entre les utilisateurs et le système mobiTrace à travers trois vues UML fondamentales : les cas d'utilisation (Use Cases), les diagrammes d'activité (logique de processus métier) et les diagrammes de séquence (interactions techniques).</text:span></text:p>
      <text:p text:style-name="P2"><text:span text:style-name="T1">1. Diagrammes de Cas d'Utilisation (Use Case)</text:span></text:p>
      <text:p text:style-name="P1"><text:span text:style-name="T1">Cette vue macroscopique illustre les périmètres d'action des différents acteurs du système. Pour plus de clarté, l'application web centrale et l'application satellite mobile sont séparées.</text:span></text:p>
      <text:p text:style-name="P4"><text:span text:style-name="T1">1.1. Application Web Centrale (mobiTrace)</text:span></text:p>
      <text:p text:style-name="P1"><text:span text:style-name="T1">flowchart LR<text:line-break/> <text:s text:c="3"/>%% Définition des acteurs<text:line-break/> <text:s text:c="3"/>Agent([👤 Agent])<text:line-break/> <text:s text:c="3"/>Admin([🛡️ Administrateur])<text:line-break/> <text:s text:c="3"/>Lecteur([👁️ Lecteur])<text:line-break/><text:line-break/> <text:s text:c="3"/>%% Héritage des rôles (Un admin peut faire tout ce qu'un agent fait)<text:line-break/> <text:s text:c="3"/>Admin -. "hérite de" .-&gt; Agent<text:line-break/> <text:s text:c="3"/>Agent -. "hérite de" .-&gt; Lecteur<text:line-break/><text:line-break/> <text:s text:c="3"/>%% Système mobiTrace<text:line-break/> <text:s text:c="3"/>subgraph "Plateforme Web mobiTrace"<text:line-break/> <text:s text:c="7"/>direction TB<text:line-break/> <text:s text:c="7"/><text:line-break/> <text:s text:c="7"/>%% Transverse<text:line-break/> <text:s text:c="7"/>C3(S'authentifier)<text:line-break/> <text:s text:c="7"/><text:line-break/> <text:s text:c="7"/>%% Bloc Consultation<text:line-break/> <text:s text:c="7"/>C1(Consulter l'inventaire)<text:line-break/> <text:s text:c="7"/>C2(Filtrer &amp; Rechercher)<text:line-break/> <text:s text:c="7"/><text:line-break/> <text:s text:c="7"/>%% Bloc Opérationnel<text:line-break/> <text:s text:c="7"/>O1(Créer des équipements)<text:line-break/> <text:s text:c="7"/>O5(Modifier la fiche d'un équipement)<text:line-break/> <text:s text:c="7"/>O2(Réaffecter rapidement par Scan)<text:line-break/> <text:s text:c="7"/>O3(Mettre à jour en masse par fichier)<text:line-break/> <text:s text:c="7"/>O4(Exporter l'inventaire en CSV)<text:line-break/> <text:s text:c="7"/><text:line-break/> <text:s text:c="7"/>%% Bloc Administration<text:line-break/> <text:s text:c="7"/>A1(Gérer le Catalogue / Gabarits)<text:line-break/> <text:s text:c="7"/>A2(Gérer les Lieux et Services UA)<text:line-break/> <text:s text:c="7"/>A3(Gérer les Comptes Utilisateurs)<text:line-break/> <text:s text:c="7"/>A4(Mettre au rebut &amp; Générer le PV)<text:line-break/> <text:s text:c="7"/>A5(Consulter le journal d'Audit)<text:line-break/> <text:s text:c="7"/>A6(Générer des planches d'étiquettes QR)<text:line-break/> <text:s text:c="7"/>A7(Configurer les en-têtes PDF)<text:line-break/> <text:s text:c="3"/>end<text:line-break/><text:line-break/> <text:s text:c="3"/>%% Liens Lecteur<text:line-break/> <text:s text:c="3"/>Lecteur --&gt; C3<text:line-break/> <text:s text:c="3"/>Lecteur --&gt; C1<text:line-break/> <text:s text:c="3"/>Lecteur --&gt; C2<text:line-break/><text:line-break/> <text:s text:c="3"/>%% Liens Agent<text:line-break/> <text:s text:c="3"/>Agent --&gt; O1<text:line-break/> <text:s text:c="3"/>Agent --&gt; O5<text:line-break/> <text:s text:c="3"/>Agent --&gt; O2<text:line-break/> <text:s text:c="3"/>Agent --&gt; O3<text:line-break/> <text:s text:c="3"/>Agent --&gt; O4<text:line-break/><text:line-break/> <text:s text:c="3"/>%% Liens Administrateur<text:line-break/> <text:s text:c="3"/>Admin --&gt; A1<text:line-break/> <text:s text:c="3"/>Admin --&gt; A2<text:line-break/> <text:s text:c="3"/>Admin --&gt; A3<text:line-break/> <text:s text:c="3"/>Admin --&gt; A4<text:line-break/> <text:s text:c="3"/>Admin --&gt; A5<text:line-break/> <text:s text:c="3"/>Admin --&gt; A6<text:line-break/> <text:s text:c="3"/>Admin --&gt; A7<text:line-break/></text:span></text:p>
      <text:p text:style-name="P4"><text:span text:style-name="T1">1.2. Application Satellite Nomade (mobiTrace-SCAN)</text:span></text:p>
      <text:p text:style-name="P1"><text:span text:style-name="T1">L'application satellite est utilisée par l'agent en mobilité sur le terrain, principalement dans des zones sans réseau (caves, archives).</text:span></text:p>
      <text:p text:style-name="P1"><text:span text:style-name="T1">flowchart LR<text:line-break/> <text:s text:c="3"/>%% Acteur Nomade<text:line-break/> <text:s text:c="3"/>AgentNomade([📱 Agent sur le terrain])<text:line-break/><text:line-break/> <text:s text:c="3"/>%% Système PWA<text:line-break/> <text:s text:c="3"/>subgraph "PWA mobiTrace-SCAN (Hors-ligne)"<text:line-break/> <text:s text:c="7"/>direction TB<text:line-break/> <text:s text:c="7"/>M1(Scanner les QR Codes à la volée)<text:line-break/> <text:s text:c="7"/>M2(Bloquer les doublons accidentels)<text:line-break/> <text:s text:c="7"/>M3(Générer le rapport de récolement .txt ou .csv)<text:line-break/> <text:s text:c="7"/>M4(Partager / Exporter le fichier localement)<text:line-break/> <text:s text:c="7"/>M5(Sauvegarder et Restaurer les données)<text:line-break/> <text:s text:c="3"/>end<text:line-break/> <text:s text:c="3"/><text:line-break/> <text:s text:c="3"/>%% Base centrale<text:line-break/> <text:s text:c="3"/>BaseCentrale[(Base mobiTrace Centrale)]<text:line-break/><text:line-break/> <text:s text:c="3"/>AgentNomade --&gt; M1<text:line-break/> <text:s text:c="3"/>AgentNomade --&gt; M2<text:line-break/> <text:s text:c="3"/>AgentNomade --&gt; M3<text:line-break/> <text:s text:c="3"/>AgentNomade --&gt; M4<text:line-break/> <text:s text:c="3"/>AgentNomade --&gt; M5<text:line-break/> <text:s text:c="3"/><text:line-break/> <text:s text:c="3"/>M4 -. "Réintégration (Use Case O3)" .-&gt; BaseCentrale<text:line-break/></text:span></text:p>
      <text:p text:style-name="P2"><text:span text:style-name="T1">2. Diagrammes d'Activité (Logique de Processus)</text:span></text:p>
      <text:p text:style-name="P4"><text:span text:style-name="T1">2.1. Réaffectation par Scan (Douchette connectée au PC)</text:span></text:p>
      <text:p text:style-name="P1"><text:span text:style-name="T1">Ce diagramme détaille l'algorithme implémenté dans l'application web principale (MobilierCtrl.processScan()). Il décrit le comportement ergonomique pensé pour un usage de type "Caisse de supermarché" (focus ininterrompu).</text:span></text:p>
      <text:p text:style-name="P1"><text:span text:style-name="T1">stateDiagram-v2<text:line-break/> <text:s text:c="3"/>direction TB<text:line-break/> <text:s text:c="3"/>[*] --&gt; ChoixDestination : L'agent sélectionne Service, Lieu et Statut cible<text:line-break/> <text:s text:c="3"/><text:line-break/> <text:s text:c="3"/>ChoixDestination --&gt; AttenteScan : Focus sur le champ "Scanner l'identifiant"<text:line-break/> <text:s text:c="3"/><text:line-break/> <text:s text:c="3"/>AttenteScan --&gt; CaptureCode : Lecture du QR Code (Douchette)<text:line-break/> <text:s text:c="3"/>CaptureCode --&gt; ValidationFormat : Détection de la touche "Entrée"<text:line-break/> <text:s text:c="3"/><text:line-break/> <text:s text:c="3"/>state ValidationFormat {<text:line-break/> <text:s text:c="7"/>direction LR<text:line-break/> <text:s text:c="7"/>VerificationRegex : Regex ^MOB-\d{6}$<text:line-break/> <text:s text:c="3"/>}<text:line-break/> <text:s text:c="3"/><text:line-break/> <text:s text:c="3"/>ValidationFormat --&gt; ErreurFormat : Format Invalide<text:line-break/> <text:s text:c="3"/>ErreurFormat --&gt; AttenteScan : Affichage Alerte UI + Vidage champ<text:line-break/> <text:s text:c="3"/><text:line-break/> <text:s text:c="3"/>ValidationFormat --&gt; RechercheBase : Format Valide<text:line-break/> <text:s text:c="3"/>RechercheBase --&gt; EquipementIntrouvable : 0 résultat (API)<text:line-break/> <text:s text:c="3"/>EquipementIntrouvable --&gt; AttenteScan : Ajout badge Rouge (Journal) + Vidage champ<text:line-break/> <text:s text:c="3"/><text:line-break/> <text:s text:c="3"/>RechercheBase --&gt; MiseAJour : Équipement identifié (UUID)<text:line-break/> <text:s text:c="3"/>MiseAJour --&gt; Succes : Requête PATCH (PostgREST)<text:line-break/> <text:s text:c="3"/><text:line-break/> <text:s text:c="3"/>Succes --&gt; AttenteScan : Ajout badge Vert (Journal) + Vidage champ<text:line-break/></text:span></text:p>
      <text:p text:style-name="P4"><text:span text:style-name="T1">2.2. Mise à jour en masse via Fichier plat (.txt / .csv)</text:span></text:p>
      <text:p text:style-name="P1"><text:span text:style-name="T1">Ce processus illustre la réintégration du travail terrain (via mobiTrace-SCAN) dans la base centrale. L'optimisation majeure repose sur le nettoyage des données côté client avant l'envoi au serveur.</text:span></text:p>
      <text:p text:style-name="P1"><text:span text:style-name="T1">stateDiagram-v2<text:line-break/> <text:s text:c="3"/>direction TB<text:line-break/> <text:s text:c="3"/>[*] --&gt; ChoixAffectationCible : Sélection Service, Lieu et Statut de destination<text:line-break/> <text:s text:c="3"/><text:line-break/> <text:s text:c="3"/>ChoixAffectationCible --&gt; UploadFichier : Glisser-déposer du fichier texte (.txt/.csv)<text:line-break/> <text:s text:c="3"/>UploadFichier --&gt; TraitementLocal : Clic sur "Lancer l'import"<text:line-break/> <text:s text:c="3"/><text:line-break/> <text:s text:c="3"/>state TraitementLocal {<text:line-break/> <text:s text:c="7"/>direction TB<text:line-break/> <text:s text:c="7"/>LectureMemoire : API FileReader (Client-side)<text:line-break/> <text:s text:c="7"/>ExtractionLignes : Découpage par sauts de ligne<text:line-break/> <text:s text:c="7"/>FiltreRegex : Conservation stricte des ^MOB-\d{6}$<text:line-break/> <text:s text:c="7"/>Dedoublonnage : Utilisation d'un objet Set (O(1))<text:line-break/> <text:s text:c="7"/><text:line-break/> <text:s text:c="7"/>LectureMemoire --&gt; ExtractionLignes<text:line-break/> <text:s text:c="7"/>ExtractionLignes --&gt; FiltreRegex<text:line-break/> <text:s text:c="7"/>FiltreRegex --&gt; Dedoublonnage<text:line-break/> <text:s text:c="3"/>}<text:line-break/> <text:s text:c="3"/><text:line-break/> <text:s text:c="3"/>TraitementLocal --&gt; ControleVolume<text:line-break/> <text:s text:c="3"/><text:line-break/> <text:s text:c="3"/>ControleVolume --&gt; ErreurImport : 0 identifiant valide trouvé<text:line-break/> <text:s text:c="3"/>ErreurImport --&gt; [*] : Affichage Alerte<text:line-break/> <text:s text:c="3"/><text:line-break/> <text:s text:c="3"/>ControleVolume --&gt; BoucleParLots : Identifiants détectés<text:line-break/> <text:s text:c="3"/><text:line-break/> <text:s text:c="3"/>state BoucleParLots {<text:line-break/> <text:s text:c="7"/>direction LR<text:line-break/> <text:s text:c="7"/>Decoupage : Création de "Chunks" (Lots de 100 max)<text:line-break/> <text:s text:c="7"/>AppelAPI : Envoi Bulk PATCH au serveur<text:line-break/> <text:s text:c="7"/>Decoupage --&gt; AppelAPI<text:line-break/> <text:s text:c="7"/>AppelAPI --&gt; Decoupage : Lot suivant<text:line-break/> <text:s text:c="3"/>}<text:line-break/> <text:s text:c="3"/><text:line-break/> <text:s text:c="3"/>BoucleParLots --&gt; BilanExecution : Tous les lots envoyés<text:line-break/> <text:s text:c="3"/><text:line-break/> <text:s text:c="3"/>BilanExecution --&gt; SuccesTotal : 100% des identifiants reconnus et mis à jour<text:line-break/> <text:s text:c="3"/>BilanExecution --&gt; SuccesPartiel : Certains équipements étaient inconnus en base<text:line-break/> <text:s text:c="3"/><text:line-break/> <text:s text:c="3"/>SuccesTotal --&gt; [*]<text:line-break/> <text:s text:c="3"/>SuccesPartiel --&gt; [*]<text:line-break/></text:span></text:p>
      <text:p text:style-name="P4"><text:span text:style-name="T1">2.3. Création d'un Modèle (Gabarit) au Catalogue</text:span></text:p>
      <text:p text:style-name="P1"><text:span text:style-name="T1">Ce diagramme modélise l'intelligence front-end (GabaritCtrl.handleSave) lors de l'ajout d'un modèle au catalogue. Il met en évidence le calcul de l'incrément, la gestion dynamique des JSON et la compression locale des photos.</text:span></text:p>
      <text:p text:style-name="P1"><text:span text:style-name="T1">stateDiagram-v2<text:line-break/> <text:s text:c="3"/>direction TB<text:line-break/> <text:s text:c="3"/>[*] --&gt; ChoixCategorie : L'administrateur sélectionne une catégorie (ex: Bureau)<text:line-break/><text:line-break/> <text:s text:c="3"/>ChoixCategorie --&gt; CalculReference : L'application filtre le tableau (app.js)<text:line-break/> <text:s text:c="3"/>CalculReference --&gt; SaisieGabarit : Suggestion automatique MAX(id)+1 (ex: BUR-004)<text:line-break/><text:line-break/> <text:s text:c="3"/>state SaisieGabarit {<text:line-break/> <text:s text:c="7"/>direction TB<text:line-break/> <text:s text:c="7"/>SaisieNom : Saisie du nom descriptif<text:line-break/> <text:s text:c="7"/>AjoutJSON : Ajout dynamique d'attributs (constructeur JSON)<text:line-break/> <text:s text:c="7"/>AjoutPhoto : Upload Photo Témoin<text:line-break/> <text:s text:c="7"/>SaisieNom --&gt; AjoutJSON<text:line-break/> <text:s text:c="7"/>AjoutJSON --&gt; AjoutPhoto<text:line-break/> <text:s text:c="3"/>}<text:line-break/><text:line-break/> <text:s text:c="3"/>SaisieGabarit --&gt; SoumissionFormulaire : Clic sur Enregistrer<text:line-break/><text:line-break/> <text:s text:c="3"/>SoumissionFormulaire --&gt; TraitementImage<text:line-break/> <text:s text:c="3"/>state TraitementImage {<text:line-break/> <text:s text:c="7"/>direction LR<text:line-break/> <text:s text:c="7"/>CheckTaille : Vérification (&lt; 5Mo)<text:line-break/> <text:s text:c="7"/>CompressionCanvas : Redimensionnement via Canvas API<text:line-break/> <text:s text:c="7"/>Base64 : Conversion en Base64 (JPEG 80%)<text:line-break/> <text:s text:c="7"/>CheckTaille --&gt; CompressionCanvas<text:line-break/> <text:s text:c="7"/>CompressionCanvas --&gt; Base64<text:line-break/> <text:s text:c="3"/>}<text:line-break/><text:line-break/> <text:s text:c="3"/>TraitementImage --&gt; CheckRegex<text:line-break/><text:line-break/> <text:s text:c="3"/>state CheckRegex {<text:line-break/> <text:s text:c="7"/>Verification : Charte de Nommage (Regex ^[A-Z]{3}-\d{3}$)<text:line-break/> <text:s text:c="3"/>}<text:line-break/><text:line-break/> <text:s text:c="3"/>CheckRegex --&gt; ErreurSaisie : Format invalide<text:line-break/> <text:s text:c="3"/>ErreurSaisie --&gt; SaisieGabarit : Alerte UI<text:line-break/><text:line-break/> <text:s text:c="3"/>CheckRegex --&gt; EnregistrementBase : Format valide<text:line-break/> <text:s text:c="3"/>EnregistrementBase --&gt; Succes : API POST /gabarits<text:line-break/> <text:s text:c="3"/>Succes --&gt; [*]<text:line-break/></text:span></text:p>
      <text:p text:style-name="P4"><text:span text:style-name="T1">2.4. Intégration en masse d'Équipements (Bulk Insert)</text:span></text:p>
      <text:p text:style-name="P1"><text:span text:style-name="T1">Ce processus illustre la création simultanée de dizaines de meubles. Il met en avant le mécanisme de protection contre les conflits (Race Conditions) délégué au moteur PostgreSQL.</text:span></text:p>
      <text:p text:style-name="P1"><text:span text:style-name="T1">stateDiagram-v2<text:line-break/> <text:s text:c="3"/>direction TB<text:line-break/> <text:s text:c="3"/>[*] --&gt; ChoixModele : L'agent sélectionne un Modèle du catalogue<text:line-break/> <text:s text:c="3"/><text:line-break/> <text:s text:c="3"/>ChoixModele --&gt; SaisieAffectation : Sélection UA, Lieu et Statut<text:line-break/> <text:s text:c="3"/>SaisieAffectation --&gt; DefinitionQuantite : Saisie de la quantité (ex: 100 chaises)<text:line-break/> <text:s text:c="3"/>DefinitionQuantite --&gt; ValidationForm : Clic sur Enregistrer<text:line-break/> <text:s text:c="3"/><text:line-break/> <text:s text:c="3"/>ValidationForm --&gt; TraitementClient : Front-end (app.js)<text:line-break/> <text:s text:c="3"/>state TraitementClient {<text:line-break/> <text:s text:c="7"/>DuplicationJSON : Création d'un tableau contenant 100 objets identiques<text:line-break/> <text:s text:c="3"/>}<text:line-break/> <text:s text:c="3"/><text:line-break/> <text:s text:c="3"/>TraitementClient --&gt; RequeteAPI : POST /mobiliers (Tableau JSON complet)<text:line-break/> <text:s text:c="3"/><text:line-break/> <text:s text:c="3"/>RequeteAPI --&gt; MoteurSQL : Back-end (PostgreSQL)<text:line-break/> <text:s text:c="3"/>state MoteurSQL {<text:line-break/> <text:s text:c="7"/>direction TB<text:line-break/> <text:s text:c="7"/>LigneParLigne : Pour chaque ligne insérée<text:line-break/> <text:s text:c="7"/>TriggerBEFORE : Trigger BEFORE INSERT (set_mob_id)<text:line-break/> <text:s text:c="7"/>Sequence : seq_mobilier_id.nextval<text:line-break/> <text:s text:c="7"/>AffectationID : Attribution unique (ex: MOB-123456)<text:line-break/> <text:s text:c="7"/><text:line-break/> <text:s text:c="7"/>LigneParLigne --&gt; TriggerBEFORE<text:line-break/> <text:s text:c="7"/>TriggerBEFORE --&gt; Sequence<text:line-break/> <text:s text:c="7"/>Sequence --&gt; AffectationID<text:line-break/> <text:s text:c="3"/>}<text:line-break/> <text:s text:c="3"/><text:line-break/> <text:s text:c="3"/>MoteurSQL --&gt; Succes : Transaction SQL Validée (ACID)<text:line-break/> <text:s text:c="3"/>Succes --&gt; [*] : Retour UI (100 équipements créés)<text:line-break/></text:span></text:p>
      <text:p text:style-name="P4"><text:span text:style-name="T1">2.5. Modification individuelle d'un équipement</text:span></text:p>
      <text:p text:style-name="P1"><text:soft-page-break/><text:span text:style-name="T1">Ce diagramme illustre le parcours de mise à jour d'une fiche d'équipement. Il met en évidence la séparation des droits et le déclenchement intelligent de la traçabilité.</text:span></text:p>
      <text:p text:style-name="P1"><text:span text:style-name="T1">stateDiagram-v2<text:line-break/> <text:s text:c="3"/>direction TB<text:line-break/> <text:s text:c="3"/>[*] --&gt; ClicFiche : Depuis la vue Inventaire<text:line-break/> <text:s text:c="3"/>ClicFiche --&gt; AffichageFormulaire : Pré-remplissage des champs<text:line-break/> <text:s text:c="3"/><text:line-break/> <text:s text:c="3"/>state AffichageFormulaire {<text:line-break/> <text:s text:c="7"/>direction TB<text:line-break/> <text:s text:c="7"/>ModifGabarit : Choix d'un autre modèle (optionnel)<text:line-break/> <text:s text:c="7"/>ModifAffectation : Changement Service / Lieu / Statut<text:line-break/> <text:s text:c="7"/>ModifRemarques : Mise à jour des commentaires<text:line-break/> <text:s text:c="3"/>}<text:line-break/> <text:s text:c="3"/><text:line-break/> <text:s text:c="3"/>AffichageFormulaire --&gt; ActionAgent : Clic "Sauvegarder"<text:line-break/> <text:s text:c="3"/>AffichageFormulaire --&gt; ActionAdmin : Clic "Supprimer" (Visible uniquement par Admin)<text:line-break/> <text:s text:c="3"/><text:line-break/> <text:s text:c="3"/>state ActionAgent {<text:line-break/> <text:s text:c="7"/>VerifModele : Validation sélection Gabarit<text:line-break/> <text:s text:c="7"/>EnvoiPatch : Appel API (PATCH /mobiliers)<text:line-break/> <text:s text:c="7"/>VerifModele --&gt; EnvoiPatch<text:line-break/> <text:s text:c="3"/>}<text:line-break/> <text:s text:c="3"/><text:line-break/> <text:s text:c="3"/>state ActionAdmin {<text:line-break/> <text:s text:c="7"/>Confirmation : Pop-up de confirmation<text:line-break/> <text:s text:c="7"/>EnvoiDelete : Appel API (DELETE /mobiliers)<text:line-break/> <text:s text:c="7"/>Confirmation --&gt; EnvoiDelete<text:line-break/> <text:s text:c="3"/>}<text:line-break/> <text:s text:c="3"/><text:line-break/> <text:s text:c="3"/>ActionAgent --&gt; ExecutionSQL<text:line-break/> <text:s text:c="3"/>ActionAdmin --&gt; ExecutionSQL<text:line-break/> <text:s text:c="3"/><text:line-break/> <text:s text:c="3"/>state ExecutionSQL {<text:line-break/> <text:s text:c="7"/>direction TB<text:line-break/> <text:s text:c="7"/>TransactionBase : PostgREST -&gt; PostgreSQL<text:line-break/> <text:s text:c="7"/>TriggerAudit : Déclenchement Trigger Log_Mobilier<text:line-break/> <text:s text:c="7"/>CalculDiff : Calcul différentiel (OLD vs NEW) pour tracer uniquement les champs modifiés<text:line-break/> <text:s text:c="7"/>TransactionBase --&gt; TriggerAudit<text:line-break/> <text:s text:c="7"/>TriggerAudit --&gt; CalculDiff<text:line-break/> <text:s text:c="3"/>}<text:line-break/> <text:s text:c="3"/><text:line-break/> <text:s text:c="3"/>ExecutionSQL --&gt; Succes : Fiche mise à jour ou supprimée<text:line-break/> <text:s text:c="3"/>Succes --&gt; [*] : Retour à l'inventaire<text:line-break/></text:span></text:p>
      <text:p text:style-name="P4"><text:span text:style-name="T1">2.6. Gestion des Utilisateurs (Création et Mot de passe)</text:span></text:p>
      <text:p text:style-name="P1"><text:span text:style-name="T1">Procédure de création d'un accès ou de réinitialisation de mot de passe par un administrateur, utilisant une modale sécurisée.</text:span></text:p>
      <text:p text:style-name="P1"><text:span text:style-name="T1">stateDiagram-v2<text:line-break/> <text:s text:c="3"/>direction TB<text:line-break/> <text:s text:c="3"/>[*] --&gt; VueUtilisateurs : L'Administrateur accède à l'onglet Utilisateurs<text:line-break/> <text:s text:c="3"/><text:line-break/> <text:s text:c="3"/>VueUtilisateurs --&gt; ChoixAction<text:line-break/> <text:s text:c="3"/><text:line-break/> <text:s text:c="3"/>state ChoixAction {<text:line-break/> <text:s text:c="7"/>direction LR<text:line-break/> <text:s text:c="7"/>ActionCreer : Clic "Nouvel utilisateur"<text:line-break/> <text:s text:c="7"/>ActionReset : Clic icône "Cadenas" (Réinitialiser)<text:line-break/> <text:s text:c="3"/>}<text:line-break/> <text:s text:c="3"/><text:line-break/> <text:s text:c="3"/>ActionCreer --&gt; FormulaireCreation : Saisie Email + Rôle<text:line-break/> <text:s text:c="3"/>FormulaireCreation --&gt; OuvertureModalePwd<text:line-break/> <text:s text:c="3"/>ActionReset --&gt; OuvertureModalePwd<text:line-break/> <text:s text:c="3"/><text:line-break/> <text:s text:c="3"/>OuvertureModalePwd --&gt; SaisieModale : Ouverture modale DSFR (PasswordModalCtrl)<text:line-break/> <text:s text:c="3"/><text:line-break/> <text:s text:c="3"/>state SaisieModale {<text:line-break/> <text:s text:c="7"/>SaisieMDP : Saisie du mot de passe<text:line-break/> <text:s text:c="7"/>ValidationMDP : Clic "Valider"<text:line-break/> <text:s text:c="7"/>SaisieMDP --&gt; ValidationMDP<text:line-break/> <text:s text:c="3"/>}<text:line-break/> <text:s text:c="3"/><text:line-break/> <text:s text:c="3"/>SaisieModale --&gt; Annulation : Clic "Annuler"<text:line-break/> <text:s text:c="3"/>Annulation --&gt; VueUtilisateurs : Abandon de l'opération<text:line-break/> <text:s text:c="3"/><text:line-break/> <text:s text:c="3"/>SaisieModale --&gt; AppelRPC : Mot de passe capturé<text:line-break/> <text:s text:c="3"/><text:line-break/> <text:s text:c="3"/>state AppelRPC {<text:line-break/> <text:s text:c="7"/>direction TB<text:line-break/> <text:s text:c="7"/>SwitchType : Type d'action ?<text:line-break/> <text:s text:c="7"/>RPC_Creation : POST /rpc/creer_utilisateur<text:line-break/> <text:s text:c="7"/>RPC_Reset : POST /rpc/reinitialiser_mdp<text:line-break/> <text:s text:c="7"/>SwitchType --&gt; RPC_Creation<text:line-break/> <text:s text:c="7"/>SwitchType --&gt; RPC_Reset<text:line-break/> <text:s text:c="3"/>}<text:line-break/> <text:s text:c="3"/><text:line-break/> <text:s text:c="3"/>AppelRPC --&gt; TraitementBDD<text:line-break/> <text:s text:c="3"/><text:line-break/> <text:s text:c="3"/>state TraitementBDD {<text:line-break/> <text:s text:c="7"/>Hachage : crypt(pwd, gen_salt('bf'))<text:line-break/> <text:s text:c="7"/>Execution : INSERT ou UPDATE<text:line-break/> <text:s text:c="7"/>Hachage --&gt; Execution<text:line-break/> <text:s text:c="3"/>}<text:line-break/> <text:s text:c="3"/><text:line-break/> <text:s text:c="3"/>TraitementBDD --&gt; Succes : 200 OK<text:line-break/> <text:s text:c="3"/>Succes --&gt; VueUtilisateurs : Rechargement de la liste<text:line-break/></text:span></text:p>
      <text:p text:style-name="P4"><text:span text:style-name="T1">2.7. Gestion du Référentiel des Lieux Physiques</text:span></text:p>
      <text:p text:style-name="P1"><text:span text:style-name="T1">Parcours d'un administrateur lors de la gestion des bâtiments. Montre la vérification d'intégrité relationnelle empêchant la suppression d'un lieu s'il contient encore du matériel.</text:span></text:p>
      <text:p text:style-name="P1"><text:span text:style-name="T1">stateDiagram-v2<text:line-break/> <text:s text:c="3"/>direction TB<text:line-break/> <text:s text:c="3"/>[*] --&gt; VueLieux : L'Admin accède à l'onglet "Lieux physiques"<text:line-break/> <text:s text:c="3"/><text:line-break/> <text:s text:c="3"/>VueLieux --&gt; ChoixAction<text:line-break/> <text:s text:c="3"/><text:line-break/> <text:s text:c="3"/>state ChoixAction {<text:line-break/> <text:s text:c="7"/>direction LR<text:line-break/> <text:s text:c="7"/>ActionCreer : Clic "Nouveau lieu"<text:line-break/> <text:s text:c="7"/>ActionEditer : Clic icône "Éditer" sur une ligne<text:line-break/> <text:s text:c="3"/>}<text:line-break/> <text:s text:c="3"/><text:line-break/> <text:s text:c="3"/>ActionCreer --&gt; FormulaireCreation : Formulaire vide<text:line-break/> <text:s text:c="3"/>ActionEditer --&gt; FormulaireEdition : Formulaire pré-rempli<text:line-break/> <text:s text:c="3"/><text:line-break/> <text:s text:c="3"/>state FormulaireCreation {<text:line-break/> <text:s text:c="7"/>SaisieNomC : Saisie du nom du site/bâtiment<text:line-break/> <text:s text:c="3"/>}<text:line-break/> <text:s text:c="3"/><text:line-break/> <text:s text:c="3"/>state FormulaireEdition {<text:line-break/> <text:s text:c="7"/>SaisieNomE : Modification du nom<text:line-break/> <text:s text:c="7"/>BoutonSupprimer : Clic "Supprimer"<text:line-break/> <text:s text:c="3"/>}<text:line-break/> <text:s text:c="3"/><text:line-break/> <text:s text:c="3"/>FormulaireCreation --&gt; AppelAPICreation : Clic "Enregistrer"<text:line-break/> <text:s text:c="3"/>FormulaireEdition --&gt; AppelAPIEdition : Clic "Mettre à jour"<text:line-break/> <text:s text:c="3"/>BoutonSupprimer --&gt; AppelAPISuppression : Validation suppression<text:line-break/> <text:s text:c="3"/><text:line-break/> <text:s text:c="3"/>AppelAPICreation --&gt; RequeteBDD : POST /lieux<text:line-break/> <text:s text:c="3"/>AppelAPIEdition --&gt; RequeteBDD : PATCH /lieux<text:line-break/> <text:s text:c="3"/>AppelAPISuppression --&gt; RequeteBDD : DELETE /lieux<text:line-break/> <text:s text:c="3"/><text:line-break/> <text:s text:c="3"/>state RequeteBDD {<text:line-break/> <text:s text:c="7"/>direction TB<text:line-break/> <text:s text:c="7"/>ExecutionSQL : Exécution par PostgREST (Contraintes FK)<text:line-break/> <text:s text:c="7"/>TriggerAudit : log_admin_action() (Historisation)<text:line-break/> <text:s text:c="7"/>ExecutionSQL --&gt; TriggerAudit<text:line-break/> <text:s text:c="3"/>}<text:line-break/> <text:s text:c="3"/><text:line-break/> <text:s text:c="3"/>RequeteBDD --&gt; Echec : Erreur d'intégrité (Lieu rattaché à des équipements)<text:line-break/> <text:s text:c="3"/>RequeteBDD --&gt; Succes : Opération validée<text:line-break/> <text:s text:c="3"/><text:line-break/> <text:s text:c="3"/>Echec --&gt; VueLieux : Affichage Alerte Erreur<text:line-break/> <text:s text:c="3"/>Succes --&gt; VueLieux : Rechargement de la liste + Actualisation Filtres<text:line-break/></text:span></text:p>
      <text:p text:style-name="P4"><text:span text:style-name="T1">2.8. Gestion du Référentiel des Services (Structures SAGES)</text:span></text:p>
      <text:p text:style-name="P1"><text:span text:style-name="T1">Parcours d'administration des Unités Administratives (UA), liées par contrainte forte à un Lieu.</text:span></text:p>
      <text:p text:style-name="P1"><text:span text:style-name="T1">stateDiagram-v2<text:line-break/> <text:s text:c="3"/>direction TB<text:line-break/> <text:s text:c="3"/>[*] --&gt; VueStructures : L'Admin accède à l'onglet "Unités Administratives (UA)"<text:line-break/> <text:s text:c="3"/><text:line-break/> <text:s text:c="3"/>VueStructures --&gt; ChoixAction<text:line-break/> <text:s text:c="3"/><text:line-break/> <text:s text:c="3"/>state ChoixAction {<text:line-break/> <text:s text:c="7"/>direction LR<text:line-break/> <text:s text:c="7"/>ActionCreer : Clic "Nouveau Service"<text:line-break/> <text:s text:c="7"/>ActionEditer : Clic icône "Éditer" sur une ligne<text:line-break/> <text:s text:c="3"/>}<text:line-break/> <text:s text:c="3"/><text:line-break/> <text:s text:c="3"/>ActionCreer --&gt; FormulaireCreation : Formulaire vide<text:line-break/> <text:s text:c="3"/>ActionEditer --&gt; FormulaireEdition : Formulaire pré-rempli<text:line-break/> <text:s text:c="3"/><text:line-break/> <text:s text:c="3"/>state FormulaireCreation {<text:line-break/> <text:s text:c="7"/>SaisieCodeC : Saisie Code SAGES (PK)<text:line-break/> <text:s text:c="7"/>SaisieLibelleC : Saisie Libellé complet<text:line-break/> <text:s text:c="7"/>ChoixLieuC : Sélection du Lieu de rattachement<text:line-break/> <text:s text:c="3"/>}<text:line-break/> <text:s text:c="3"/><text:line-break/> <text:s text:c="3"/>state FormulaireEdition {<text:line-break/> <text:s text:c="7"/>SaisieLibelleE : Modification du Libellé<text:line-break/> <text:s text:c="7"/>ChoixLieuE : Modification du Lieu<text:line-break/> <text:s text:c="7"/>BoutonSupprimer : Clic "Supprimer"<text:line-break/> <text:s text:c="3"/>}<text:line-break/> <text:s text:c="3"/><text:line-break/> <text:s text:c="3"/>FormulaireCreation --&gt; AppelAPICreation : Clic "Enregistrer"<text:line-break/> <text:s text:c="3"/>FormulaireEdition --&gt; AppelAPIEdition : Clic "Mettre à jour"<text:line-break/> <text:s text:c="3"/>BoutonSupprimer --&gt; AppelAPISuppression : Validation suppression<text:line-break/> <text:s text:c="3"/><text:line-break/> <text:s text:c="3"/>AppelAPICreation --&gt; RequeteBDD : POST /structures<text:line-break/> <text:s text:c="3"/>AppelAPIEdition --&gt; RequeteBDD : PATCH /structures<text:line-break/> <text:s text:c="3"/>AppelAPISuppression --&gt; RequeteBDD : DELETE /structures<text:line-break/> <text:s text:c="3"/><text:line-break/> <text:s text:c="3"/>state RequeteBDD {<text:line-break/> <text:s text:c="7"/>direction TB<text:line-break/> <text:s text:c="7"/>ExecutionSQL : Exécution par PostgREST (Contraintes FK)<text:line-break/> <text:s text:c="7"/>TriggerAudit : log_admin_action() (Historisation)<text:line-break/> <text:s text:c="7"/>ExecutionSQL --&gt; TriggerAudit<text:line-break/> <text:s text:c="3"/>}<text:line-break/> <text:s text:c="3"/><text:line-break/> <text:s text:c="3"/>RequeteBDD --&gt; Echec : Erreur d'intégrité (Service rattaché à du matériel)<text:line-break/> <text:s text:c="3"/>RequeteBDD --&gt; Succes : Opération validée<text:line-break/> <text:s text:c="3"/><text:line-break/> <text:s text:c="3"/>Echec --&gt; VueStructures : Affichage Alerte Erreur<text:line-break/> <text:s text:c="3"/>Succes --&gt; VueStructures : Rechargement de la liste + Actualisation Filtres<text:line-break/></text:span></text:p>
      <text:p text:style-name="P4"><text:span text:style-name="T1">2.9. Consultation du Journal d'Audit (Traçabilité)</text:span></text:p>
      <text:p text:style-name="P1"><text:span text:style-name="T1">Capacité d'un administrateur à explorer l'historique inaltérable des actions effectuées sur le système.</text:span></text:p>
      <text:p text:style-name="P1"><text:span text:style-name="T1">stateDiagram-v2<text:line-break/> <text:s text:c="3"/>direction TB<text:line-break/> <text:s text:c="3"/>[*] --&gt; VueAudit : L'Administrateur accède à l'onglet "Journal d'Audit"<text:line-break/> <text:s text:c="3"/><text:line-break/> <text:s text:c="3"/>VueAudit --&gt; ChargementInitial : Fetch GET /audit_logs (paginé par défaut)<text:line-break/> <text:s text:c="3"/>ChargementInitial --&gt; AffichageTableau : Affichage des dernières traces<text:line-break/> <text:s text:c="3"/><text:line-break/> <text:s text:c="3"/>state AffichageTableau {<text:line-break/> <text:s text:c="7"/>direction TB<text:line-break/> <text:s text:c="7"/>FiltrerAction : Filtrer par type (CRÉATION, MODIFICATION, SUPPRESSION)<text:line-break/> <text:s text:c="7"/>FiltrerUtilisateur : Chercher les actions d'un agent spécifique<text:line-break/> <text:s text:c="7"/>FiltrerEquipement : Retracer la vie d'un équipement (ID Métier)<text:line-break/> <text:s text:c="3"/>}<text:line-break/> <text:s text:c="3"/><text:line-break/> <text:s text:c="3"/>AffichageTableau --&gt; ActionFiltrage : Application d'un ou plusieurs filtres<text:line-break/> <text:s text:c="3"/>ActionFiltrage --&gt; ChargementFiltre : Appel API avec paramètres (ex: ?id_metier=eq.MOB-123456)<text:line-break/> <text:s text:c="3"/>ChargementFiltre --&gt; AffichageTableau : Mise à jour de la liste<text:line-break/> <text:s text:c="3"/><text:line-break/> <text:s text:c="3"/>AffichageTableau --&gt; ConsultationDetails : Lecture approfondie de la colonne "Détails" (Différentiel OLD vs NEW)<text:line-break/> <text:s text:c="3"/>ConsultationDetails --&gt; [*]<text:line-break/></text:span></text:p>
      <text:p text:style-name="P4"><text:span text:style-name="T1">2.10. Génération de Planches d'Étiquettes QR Codes</text:span></text:p>
      <text:p text:style-name="P1"><text:span text:style-name="T1">Outil autonome d'édition d'étiquettes (qrcode-generator.html). La génération des codes s'effectue entièrement côté navigateur, garantissant une qualité d'impression native et vectorielle.</text:span></text:p>
      <text:p text:style-name="P1"><text:span text:style-name="T1">stateDiagram-v2<text:line-break/> <text:s text:c="3"/>direction TB<text:line-break/> <text:s text:c="3"/>[*] --&gt; VueGenerateur : L'Administrateur ouvre l'outil "Édition étiquettes"<text:line-break/><text:line-break/> <text:s text:c="3"/>VueGenerateur --&gt; Parametrage : Saisie des réglages<text:line-break/><text:line-break/> <text:s text:c="3"/>state Parametrage {<text:line-break/> <text:s text:c="7"/>direction TB<text:line-break/> <text:s text:c="7"/>ParamContenu : 1. Contenu (Préfixe MOB-, Quantité, Textes latéraux)<text:line-break/> <text:s text:c="7"/>ParamVisuel : 2. Corps &amp; Yeux (Couleurs, Formes, Dégradés)<text:line-break/> <text:s text:c="7"/>ParamLogo : 3. Logo (Upload image, Incrustation, Dimensions)<text:line-break/> <text:s text:c="7"/>ParamGabarit : 4. Gabarit (Marges A4, Lignes/Colonnes, Traits de coupe)<text:line-break/> <text:s text:c="3"/>}<text:line-break/><text:line-break/> <text:s text:c="3"/>Parametrage --&gt; GenererPlanche : Clic "Générer la planche"<text:line-break/><text:line-break/> <text:s text:c="3"/>GenererPlanche --&gt; TraitementClient : Exécution JS (Local)<text:line-break/><text:line-break/> <text:s text:c="3"/>state TraitementClient {<text:line-break/> <text:s text:c="7"/>direction TB<text:line-break/> <text:s text:c="7"/>CalculPages : Calcul du nombre de pages A4 nécessaires<text:line-break/> <text:s text:c="7"/>CalculCellules : Détermination de la taille des étiquettes (mm)<text:line-break/> <text:s text:c="7"/>BoucleQR : Boucle de dessin Canvas (Librairie QRCodeStyling)<text:line-break/> <text:s text:c="7"/>CalculPages --&gt; CalculCellules<text:line-break/> <text:s text:c="7"/>CalculCellules --&gt; BoucleQR<text:line-break/> <text:s text:c="3"/>}<text:line-break/><text:line-break/> <text:s text:c="3"/>TraitementClient --&gt; AffichageRendu : Affichage des planches prêtes<text:line-break/><text:line-break/> <text:s text:c="3"/>AffichageRendu --&gt; Impression : Clic "Imprimer"<text:line-break/> <text:s text:c="3"/><text:line-break/> <text:s text:c="3"/>Impression --&gt; SpoolerOS : window.print() (Activation des règles CSS @media print)<text:line-break/> <text:s text:c="3"/>SpoolerOS --&gt; [*] : Envoi à l'imprimante<text:line-break/></text:span></text:p>
      <text:p text:style-name="P4"><text:span text:style-name="T1">2.11. Application Nomade TRACE-SCAN (Inventaire Hors-Ligne)</text:span></text:p>
      <text:p text:style-name="P1"><text:span text:style-name="T1">Ce diagramme illustre le parcours de l'agent sur le terrain utilisant l'application mobile (PWA). Il décrit la gestion avancée des projets d'inventaire, le flux vidéo de la caméra et le comportement du système face aux doublons locaux.</text:span></text:p>
      <text:p text:style-name="P1"><text:span text:style-name="T1">stateDiagram-v2<text:line-break/> <text:s text:c="3"/>direction TB<text:line-break/> <text:s text:c="3"/>[*] --&gt; Accueil : Ouverture de l'application (PWA)<text:line-break/> <text:s text:c="3"/><text:line-break/> <text:s text:c="3"/>Accueil --&gt; GestionProjets<text:line-break/> <text:s text:c="3"/>state GestionProjets {<text:line-break/> <text:s text:c="7"/>direction LR<text:line-break/> <text:s text:c="7"/>CreerInventaire : Créer un nouvel inventaire<text:line-break/> <text:s text:c="7"/>OuvrirInventaire : Reprendre une tournée existante<text:line-break/> <text:s text:c="7"/>RestaurerBackup : Importer un historique JSON<text:line-break/> <text:s text:c="3"/>}<text:line-break/> <text:s text:c="3"/><text:line-break/> <text:s text:c="3"/>GestionProjets --&gt; LancementScanner : Clic "Ouvrir" (Projet sélectionné)<text:line-break/> <text:s text:c="3"/><text:line-break/> <text:s text:c="3"/>LancementScanner --&gt; AttenteScan : Appareil photo actif (Html5Qrcode) &amp; WakeLock<text:line-break/> <text:s text:c="3"/><text:line-break/> <text:s text:c="3"/>AttenteScan --&gt; LectureQR : Détection d'un QR Code<text:line-break/> <text:s text:c="3"/><text:line-break/> <text:s text:c="3"/>LectureQR --&gt; VerificationStockage : Traitement via storage.js<text:line-break/> <text:s text:c="3"/><text:line-break/> <text:s text:c="3"/>state VerificationStockage {<text:line-break/> <text:s text:c="7"/>VerificationDoublon : Recherche dans project.items<text:line-break/> <text:s text:c="3"/>}<text:line-break/> <text:s text:c="3"/><text:line-break/> <text:s text:c="3"/>VerificationStockage --&gt; EchecDoublon : Le meuble est déjà scanné<text:line-break/> <text:s text:c="3"/>EchecDoublon --&gt; FeedbackErreur : Vibreur (Pattern long) + Toast Erreur<text:line-break/> <text:s text:c="3"/>FeedbackErreur --&gt; AttenteScan : Reprise du flux<text:line-break/> <text:s text:c="3"/><text:line-break/> <text:s text:c="3"/>VerificationStockage --&gt; SuccesAjout : Nouvel équipement détecté<text:line-break/> <text:s text:c="3"/>SuccesAjout --&gt; EnregistrementLocal : Sauvegarde dans le localStorage<text:line-break/> <text:s text:c="3"/>EnregistrementLocal --&gt; FeedbackSucces : Vibreur (Court) + Mise à jour UI<text:line-break/> <text:s text:c="3"/>FeedbackSucces --&gt; AttenteScan : Reprise du flux<text:line-break/> <text:s text:c="3"/><text:line-break/> <text:s text:c="3"/>AttenteScan --&gt; ActionFin : L'agent clôture la tournée<text:line-break/> <text:s text:c="3"/>ActionFin --&gt; CreationExport : Clic "Export CSV"<text:line-break/> <text:s text:c="3"/>CreationExport --&gt; FichierBlob : Génération du fichier (Format universel)<text:line-break/> <text:s text:c="3"/>FichierBlob --&gt; [*] : Fichier prêt pour réintégration base centrale (Cas 2.2)<text:line-break/></text:span></text:p>
      <text:p text:style-name="P2"><text:span text:style-name="T1">3. Diagrammes de Séquence (Interactions Techniques)</text:span></text:p>
      <text:p text:style-name="P4"><text:span text:style-name="T1">3.1. Authentification et Sécurité (JWT)</text:span></text:p>
      <text:p text:style-name="P1"><text:span text:style-name="T1">Architecture Stateless (JWT) et délégation de la sécurité à PostgreSQL (via pgcrypto).</text:span></text:p>
      <text:p text:style-name="P1"><text:span text:style-name="T1">sequenceDiagram<text:line-break/> <text:s text:c="3"/>autonumber<text:line-break/> <text:s text:c="3"/>actor Utilisateur<text:line-break/> <text:s text:c="3"/>participant Navigateur as Client (app.js)<text:line-break/> <text:s text:c="3"/>participant API as Nginx + PostgREST<text:line-break/> <text:s text:c="3"/>participant BDD as PostgreSQL (public.login)<text:line-break/><text:line-break/> <text:s text:c="3"/>Utilisateur-&gt;&gt;Navigateur: Saisit email + mot de passe<text:line-break/> <text:s text:c="3"/>Navigateur-&gt;&gt;API: POST /rpc/login {email, password}<text:line-break/> <text:s text:c="3"/>API-&gt;&gt;BDD: Exécute la fonction stockée login()<text:line-break/> <text:s text:c="3"/><text:line-break/> <text:s text:c="3"/>rect rgb(240, 248, 255)<text:line-break/> <text:s text:c="7"/>note right of BDD: Logique interne (PostgreSQL)<text:line-break/> <text:s text:c="7"/>BDD-&gt;&gt;BDD: Recherche l'email dans utilisateurs<text:line-break/> <text:s text:c="7"/>BDD-&gt;&gt;BDD: crypt(password, hash) == hash_en_base<text:line-break/> <text:s text:c="3"/>end<text:line-break/><text:line-break/> <text:s text:c="3"/>alt Identifiants Corrects<text:line-break/> <text:s text:c="7"/>BDD-&gt;&gt;BDD: Génère Payload + Signature JWT (auth.sign_jwt)<text:line-break/> <text:s text:c="7"/>BDD-&gt;&gt;API: Configure l'en-tête (Set-Cookie HttpOnly)<text:line-break/> <text:s text:c="7"/>API-&gt;&gt;Navigateur: HTTP 200 OK<text:line-break/> <text:s text:c="7"/>Navigateur-&gt;&gt;Navigateur: location.reload()<text:line-break/> <text:s text:c="7"/>Navigateur-&gt;&gt;API: POST /rpc/me (Cookie transmis auto)<text:line-break/> <text:s text:c="7"/>API--&gt;&gt;Navigateur: Retourne le profil {email, role}<text:line-break/> <text:s text:c="7"/>Navigateur-&gt;&gt;Utilisateur: Affiche l'inventaire selon les droits<text:line-break/> <text:s text:c="3"/>else Identifiants Incorrects<text:line-break/> <text:s text:c="7"/>BDD--&gt;&gt;API: RAISE EXCEPTION<text:line-break/> <text:s text:c="7"/>API--&gt;&gt;Navigateur: HTTP 401 Unauthorized<text:line-break/> <text:s text:c="7"/>Navigateur-&gt;&gt;Utilisateur: Affichage modale "Identifiants incorrects"<text:line-break/> <text:s text:c="3"/>end<text:line-break/></text:span></text:p>
      <text:p text:style-name="P4"><text:span text:style-name="T1">3.2. Traitement par lot et Génération du PV de Rebut</text:span></text:p>
      <text:p text:style-name="P1"><text:span text:style-name="T1">Soulager le serveur en déportant les calculs lourds (génération de PDF) sur le navigateur de l'utilisateur.</text:span></text:p>
      <text:p text:style-name="P1"><text:soft-page-break/><text:span text:style-name="T1">sequenceDiagram<text:line-break/> <text:s text:c="3"/>autonumber<text:line-break/> <text:s text:c="3"/>actor Admin<text:line-break/> <text:s text:c="3"/>participant Navigateur as Client (jsPDF)<text:line-break/> <text:s text:c="3"/>participant API as PostgREST<text:line-break/> <text:s text:c="3"/>participant BDD as PostgreSQL<text:line-break/><text:line-break/> <text:s text:c="3"/>Admin-&gt;&gt;Navigateur: Importe un fichier TXT d'équipements à jeter<text:line-break/> <text:s text:c="3"/>Navigateur-&gt;&gt;Navigateur: FileReader (Dédoublonnage des ID en mémoire)<text:line-break/> <text:s text:c="3"/>Navigateur-&gt;&gt;API: GET /mobiliers (Découpage par lots de 100)<text:line-break/> <text:s text:c="3"/>API--&gt;&gt;Navigateur: Retourne les données complètes des équipements<text:line-break/> <text:s text:c="3"/><text:line-break/> <text:s text:c="3"/>Navigateur-&gt;&gt;Admin: Demande confirmation : "Générer PV et supprimer ?"<text:line-break/> <text:s text:c="3"/><text:line-break/> <text:s text:c="3"/>alt Confirmation Oui<text:line-break/> <text:s text:c="7"/>Navigateur-&gt;&gt;API: DELETE /mobiliers (Par lots de 100)<text:line-break/> <text:s text:c="7"/>API-&gt;&gt;BDD: Suppression physique<text:line-break/> <text:s text:c="7"/>BDD-&gt;&gt;BDD: Déclenche le Trigger Audit (Mise au rebut)<text:line-break/> <text:s text:c="7"/>API--&gt;&gt;Navigateur: HTTP 204 No Content<text:line-break/> <text:s text:c="7"/><text:line-break/> <text:s text:c="7"/>note over Navigateur: Utilisation de jspdf.umd.min.js<text:line-break/> <text:s text:c="7"/>Navigateur-&gt;&gt;Navigateur: Dessine le document (Logo, En-têtes, Tableau AutoTable)<text:line-break/> <text:s text:c="7"/>Navigateur-&gt;&gt;Admin: Téléchargement direct de "PVSORTIETRACE.pdf"<text:line-break/> <text:s text:c="3"/>end<text:line-break/></text:span></text:p>
      <text:p text:style-name="P4"><text:span text:style-name="T1">3.3. Création d'un compte et Hachage du mot de passe</text:span></text:p>
      <text:p text:style-name="P1"><text:span text:style-name="T1">Le mot de passe transite de façon éphémère et n'est pas géré côté frontend, mais est haché en Base de Données par l'algorithme Bcrypt.</text:span></text:p>
      <text:p text:style-name="P1"><text:span text:style-name="T1">sequenceDiagram<text:line-break/> <text:s text:c="3"/>autonumber<text:line-break/> <text:s text:c="3"/>actor Admin<text:line-break/> <text:s text:c="3"/>participant Navigateur as Modale UI (PasswordModal)<text:line-break/> <text:s text:c="3"/>participant API as PostgREST<text:line-break/> <text:s text:c="3"/>participant BDD as PostgreSQL (creer_utilisateur)<text:line-break/><text:line-break/> <text:s text:c="3"/>Admin-&gt;&gt;Navigateur: Saisit l'email et sélectionne le rôle<text:line-break/> <text:s text:c="3"/>Admin-&gt;&gt;Navigateur: Clic "Enregistrer l'utilisateur"<text:line-break/> <text:s text:c="3"/><text:line-break/> <text:s text:c="3"/>Navigateur-&gt;&gt;Navigateur: Intercepte l'événement de création<text:line-break/> <text:s text:c="3"/>Navigateur-&gt;&gt;Admin: Ouvre la modale DSFR sécurisée "Saisie mot de passe"<text:line-break/> <text:s text:c="3"/><text:line-break/> <text:s text:c="3"/>Admin-&gt;&gt;Navigateur: Saisit le mot de passe initial et valide<text:line-break/> <text:s text:c="3"/><text:line-break/> <text:s text:c="3"/>Navigateur-&gt;&gt;API: POST /rpc/creer_utilisateur { _email, _password, _role }<text:line-break/> <text:s text:c="3"/><text:line-break/> <text:s text:c="3"/>note over API, BDD: Appel RPC avec le jeton JWT de l'Admin<text:line-break/> <text:s text:c="3"/>API-&gt;&gt;BDD: Exécute public.creer_utilisateur()<text:line-break/> <text:s text:c="3"/><text:line-break/> <text:s text:c="3"/>rect rgb(255, 240, 245)<text:line-break/> <text:s text:c="7"/>note right of BDD: Chiffrement Fort (pgcrypto)<text:line-break/> <text:s text:c="7"/>BDD-&gt;&gt;BDD: Génère un sel cryptographique: gen_salt('bf')<text:line-break/> <text:s text:c="7"/>BDD-&gt;&gt;BDD: Hache le mot de passe: crypt(_password, sel)<text:line-break/> <text:s text:c="7"/>BDD-&gt;&gt;BDD: INSERT INTO utilisateurs (..., mot_de_passe_hash, ...)<text:line-break/> <text:s text:c="3"/>end<text:line-break/> <text:s text:c="3"/><text:line-break/> <text:s text:c="3"/>BDD--&gt;&gt;API: void (Succès)<text:line-break/> <text:s text:c="3"/>API--&gt;&gt;Navigateur: HTTP 200 OK<text:line-break/> <text:s text:c="3"/><text:line-break/> <text:s text:c="3"/>Navigateur-&gt;&gt;Navigateur: Vide la mémoire (nettoie la variable du mot de passe)<text:line-break/> <text:s text:c="3"/>Navigateur-&gt;&gt;API: GET /utilisateurs (Recharge la liste)<text:line-break/> <text:s text:c="3"/>API--&gt;&gt;Navigateur: Retourne les données<text:line-break/> <text:s text:c="3"/>Navigateur-&gt;&gt;Admin: Affichage de la liste actualisée + Alerte Succès<text:line-break/></text:span></text:p>
      <text:p text:style-name="P4"><text:span text:style-name="T1">3.4. Accès sécurisé au Journal d'Audit</text:span></text:p>
      <text:p text:style-name="P1"><text:span text:style-name="T1">Le système PostgREST, adossé aux privilèges de la base de données (GRANTs SQL), garantit que les données d'audit ne sont jamais exposées aux utilisateurs n'ayant pas les droits suffisants.</text:span></text:p>
      <text:p text:style-name="P1"><text:span text:style-name="T1">sequenceDiagram<text:line-break/> <text:s text:c="3"/>autonumber<text:line-break/> <text:s text:c="3"/>actor Admin_ou_Agent<text:line-break/> <text:s text:c="3"/>participant Navigateur as Client (app.js)<text:line-break/> <text:s text:c="3"/>participant API as Nginx + PostgREST<text:line-break/> <text:s text:c="3"/>participant BDD as PostgreSQL (audit_logs)<text:line-break/><text:line-break/> <text:s text:c="3"/>Admin_ou_Agent-&gt;&gt;Navigateur: Demande l'affichage de l'historique<text:line-break/> <text:s text:c="3"/>Navigateur-&gt;&gt;API: GET /audit_logs?order=date_action.desc<text:line-break/> <text:s text:c="3"/><text:line-break/> <text:s text:c="3"/>API-&gt;&gt;BDD: Exécute la requête avec l'identité du jeton (Role JWT)<text:line-break/> <text:s text:c="3"/><text:line-break/> <text:s text:c="3"/>alt Utilisateur avec rôle 'administrateur'<text:line-break/> <text:s text:c="7"/>note over BDD: GRANT SELECT ON audit_logs TO administrateur<text:line-break/> <text:s text:c="7"/>BDD--&gt;&gt;API: Retourne les données de journalisation<text:line-break/> <text:s text:c="7"/>API--&gt;&gt;Navigateur: HTTP 200 OK<text:line-break/> <text:s text:c="7"/>Navigateur-&gt;&gt;Admin_ou_Agent: Affichage du tableau d'audit<text:line-break/> <text:s text:c="3"/>else Utilisateur avec rôle 'agent' ou 'lecteur'<text:line-break/> <text:s text:c="7"/>note over BDD: Accès non autorisé (Pas de GRANT)<text:line-break/> <text:s text:c="7"/>BDD--&gt;&gt;API: Rejet de la requête<text:line-break/> <text:s text:c="7"/>API--&gt;&gt;Navigateur: HTTP 403 Forbidden<text:line-break/> <text:s text:c="7"/>Navigateur-&gt;&gt;Admin_ou_Agent: Affichage erreur ou interface masquée<text:line-break/> <text:s text:c="3"/>end<text:line-break/></text:span></text:p>
      <text:p text:style-name="P4"><text:span text:style-name="T1">3.5. Fonctionnement Hors-Ligne (PWA) et Sauvegarde Locale</text:span></text:p>
      <text:p text:style-name="P1"><text:span text:style-name="T1">Ce diagramme explique le comportement "Offline-First" de l'application TRACE-SCAN. Il démontre le rôle fondamental du Service Worker qui agit comme un proxy réseau local, permettant un fonctionnement total sans connexion internet (ex: dans une zone d'archives en sous-sol).</text:span></text:p>
      <text:p text:style-name="P1"><text:span text:style-name="T1">sequenceDiagram<text:line-break/> <text:s text:c="3"/>autonumber<text:line-break/> <text:s text:c="3"/>actor AgentNomade<text:line-break/> <text:s text:c="3"/>participant Navigateur as Navigateur Mobile<text:line-break/> <text:s text:c="3"/>participant SW as Service Worker (sw.js)<text:line-break/> <text:s text:c="3"/>participant API_Ext as Réseau Internet<text:line-break/> <text:s text:c="3"/>participant DB_Locale as LocalStorage (storage.js)<text:line-break/><text:line-break/> <text:s text:c="3"/>note over Navigateur, SW: L'application a déjà été installée au moins 1 fois<text:line-break/> <text:s text:c="3"/><text:line-break/> <text:s text:c="3"/>AgentNomade-&gt;&gt;Navigateur: Ouvre TRACE-SCAN (Mode Avion actif)<text:line-break/> <text:s text:c="3"/>Navigateur-&gt;&gt;SW: Fetch requêtes (index.html, app.js, css, html5-qrcode)<text:line-break/> <text:s text:c="3"/><text:line-break/> <text:s text:c="3"/>alt Réseau indisponible<text:line-break/> <text:s text:c="7"/>SW-&gt;&gt;SW: Vérifie le Cache (CACHE_NAME)<text:line-break/> <text:s text:c="7"/>SW--&gt;&gt;Navigateur: Retourne les fichiers mis en cache<text:line-break/> <text:s text:c="7"/>note right of SW: L'application démarre normalement<text:line-break/> <text:s text:c="3"/>end<text:line-break/> <text:s text:c="3"/><text:line-break/> <text:s text:c="3"/>AgentNomade-&gt;&gt;Navigateur: Lance l'appareil photo et scanne<text:line-break/> <text:s text:c="3"/>Navigateur-&gt;&gt;DB_Locale: StorageManager.addItemToProject()<text:line-break/> <text:s text:c="3"/><text:line-break/> <text:s text:c="3"/>rect rgb(240, 248, 255)<text:line-break/> <text:s text:c="7"/>note right of DB_Locale: Persistance des données en local<text:line-break/> <text:s text:c="7"/>DB_Locale-&gt;&gt;DB_Locale: Vérification anti-doublon (Set/Array)<text:line-break/> <text:s text:c="7"/>DB_Locale-&gt;&gt;DB_Locale: localStorage.setItem('trace_scan_projects_v1', JSON)<text:line-break/> <text:s text:c="3"/>end<text:line-break/> <text:s text:c="3"/><text:line-break/> <text:s text:c="3"/>DB_Locale--&gt;&gt;Navigateur: true (Enregistrement en mémoire morte)<text:line-break/> <text:s text:c="3"/>Navigateur-&gt;&gt;AgentNomade: Vibration et affichage UI<text:line-break/> <text:s text:c="3"/><text:line-break/> <text:s text:c="3"/>note over AgentNomade, DB_Locale: Plus tard, l'agent souhaite récupérer son travail...<text:line-break/> <text:s text:c="3"/><text:line-break/> <text:s text:c="3"/>AgentNomade-&gt;&gt;Navigateur: Clic "Exporter CSV"<text:line-break/> <text:s text:c="3"/>Navigateur-&gt;&gt;DB_Locale: Récupère les données de la session<text:line-break/> <text:s text:c="3"/>DB_Locale--&gt;&gt;Navigateur: Tableau des items scannés<text:line-break/> <text:s text:c="3"/><text:line-break/> <text:s text:c="3"/>Navigateur-&gt;&gt;Navigateur: Formatage (Blob + BOM UTF-8)<text:line-break/> <text:s text:c="3"/>Navigateur-&gt;&gt;AgentNomade: Génère un fichier physique local (.csv) téléchargeable<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1" meta:word-count="3324" meta:character-count="27390" meta:non-whitespace-character-count="21067"/>
    <meta:generator>LibreOfficeDev/6.0.5.2$Linux_X86_64 LibreOffice_project/</meta:generator>
  </office:meta>
</office:document-meta>
</file>