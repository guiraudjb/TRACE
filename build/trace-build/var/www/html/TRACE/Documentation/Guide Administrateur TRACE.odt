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3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6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7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8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2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2" style:family="paragraph" style:parent-style-name="Standard" style:list-style-name="WWNum2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3" style:family="paragraph" style:parent-style-name="Standard" style:list-style-name="WWNum2">
      <style:paragraph-properties fo:margin-left="0.3335in" fo:margin-right="0in" fo:margin-top="0in" fo:margin-bottom="0.0835in" loext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5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25" style:family="paragraph" style:parent-style-name="Standard" style:list-style-name="WWNum5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26" style:family="paragraph" style:parent-style-name="Standard" style:list-style-name="WWNum5">
      <style:paragraph-properties fo:margin-left="0.6146in" fo:margin-right="0in" fo:margin-top="0in" fo:margin-bottom="0.0835in" loext:contextual-spacing="false" fo:line-height="114%" fo:text-indent="-0.25in" style:auto-text-indent="false" fo:padding="0in" fo:border="none"/>
    </style:style>
    <style:style style:name="P27" style:family="paragraph" style:parent-style-name="Standard">
      <style:paragraph-properties fo:margin-top="0.0835in" fo:margin-bottom="0.1665in" loext:contextual-spacing="false" fo:line-height="114%" fo:padding="0in" fo:border="none"/>
    </style:style>
    <style:style style:name="P28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29" style:family="paragraph" style:parent-style-name="Standard">
      <style:paragraph-properties fo:line-height="114%" fo:padding="0in" fo:border="none"/>
    </style:style>
    <style:style style:name="P30" style:family="paragraph" style:parent-style-name="Standard" style:list-style-name="WWNum10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31" style:family="paragraph" style:parent-style-name="Standard" style:list-style-name="WWNum10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32" style:family="paragraph" style:parent-style-name="Standard" style:list-style-name="WWNum10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33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34" style:family="paragraph" style:parent-style-name="Heading_20_2">
      <style:paragraph-properties fo:margin-top="0.0835in" fo:margin-bottom="0.0835in" loext:contextual-spacing="false" fo:line-height="114%" fo:padding="0in" fo:border="none"/>
    </style:style>
    <style:style style:name="P35" style:family="paragraph" style:parent-style-name="Heading_20_1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P36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37" style:family="paragraph" style:parent-style-name="Heading_20_3">
      <style:paragraph-properties fo:margin-top="0.0835in" fo:margin-bottom="0.0835in" loext:contextual-spacing="false" fo:line-height="114%" fo:padding="0in" fo:border="none"/>
    </style:style>
    <style:style style:name="P38" style:family="paragraph" style:parent-style-name="Heading_20_3">
      <style:paragraph-properties fo:margin-top="0.3335in" fo:margin-bottom="0.0835in" loext:contextual-spacing="false" fo:line-height="114%" fo:padding="0in" fo:border="none"/>
    </style:style>
    <style:style style:name="T1" style:family="text">
      <style:text-properties fo:color="#1f1f1f" style:font-name="Google Sans" style:font-name-asian="Google Sans1" style:font-name-complex="Google Sans1"/>
    </style:style>
    <style:style style:name="T2" style:family="text">
      <style:text-properties fo:color="#1f1f1f" style:font-name="Google Sans" fo:font-weight="bold" style:font-name-asian="Google Sans1" style:font-weight-asian="bold" style:font-name-complex="Google Sans1" style:font-weight-complex="bold"/>
    </style:style>
    <style:style style:name="T3" style:family="text">
      <style:text-properties fo:color="#1f1f1f" style:font-name="Google Sans" fo:font-style="italic" style:font-name-asian="Google Sans1" style:font-style-asian="italic" style:font-name-complex="Google Sans1" style:font-style-complex="italic"/>
    </style:style>
    <style:style style:name="T4" style:family="text">
      <style:text-properties fo:color="#444746" style:font-name="Google Sans" style:font-name-asian="Google Sans1" style:font-name-complex="Google Sans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📘 Guide Administrateur - mobiTrace v1.0</text:span></text:p>
      <text:p text:style-name="P1"><text:span text:style-name="T1">Ce document est destiné aux administrateurs système et aux référents techniques en charge de l'exploitation de l'application </text:span><text:span text:style-name="T2">mobiTrace</text:span><text:span text:style-name="T1"> (Traçabilité, Réemploi et Affectation Circulaire des Équipements).</text:span></text:p>
      <text:p text:style-name="P33"><text:span text:style-name="T1">1. Architecture Technique</text:span></text:p>
      <text:p text:style-name="P2"><text:span text:style-name="T1">L'application repose sur une architecture robuste à trois couches, sécurisée nativement par des outils standards Linux :</text:span></text:p>
      <text:list xml:id="list1077897329" text:style-name="WWNum1">
        <text:list-item>
          <text:p text:style-name="P3"><text:span text:style-name="T2">Serveur Web (Front) :</text:span><text:span text:style-name="T1"> Nginx assurant le SSL, le reverse proxy et le Rate Limiting.</text:span></text:p>
        </text:list-item>
        <text:list-item>
          <text:p text:style-name="P3"><text:span text:style-name="T2">Backend (API) :</text:span><text:span text:style-name="T1"> PostgREST transformant le schéma PostgreSQL en API REST sécurisée.</text:span></text:p>
        </text:list-item>
        <text:list-item>
          <text:p text:style-name="P3"><text:span text:style-name="T2">Base de données :</text:span><text:span text:style-name="T1"> PostgreSQL 17 avec gestion des rôles (RLS) et Triggers d'audit.</text:span></text:p>
        </text:list-item>
        <text:list-item>
          <text:p text:style-name="P16"><text:span text:style-name="T2">Protection :</text:span><text:span text:style-name="T1"> Fail2Ban surveillant les journaux Nginx pour bannir les attaques par force brute.</text:span></text:p>
        </text:list-item>
      </text:list>
      <text:p text:style-name="P34"><text:span text:style-name="T1">2. Installation et Déploiement</text:span></text:p>
      <text:p text:style-name="P1"><text:span text:style-name="T1">Le déploiement est entièrement automatisé via le paquet Debian (.deb).</text:span></text:p>
      <text:p text:style-name="P36"><text:span text:style-name="T1">2.1 Installation</text:span></text:p>
      <text:p text:style-name="P1"><text:span text:style-name="T1">sudo apt update<text:line-break/>sudo apt install ./trace-server_1.0.0_all.deb<text:line-break/><text:line-break/></text:span></text:p>
      <text:p text:style-name="P1"><text:span text:style-name="T3">Note : Le système résout automatiquement les dépendances et lance le script postinst.</text:span></text:p>
      <text:p text:style-name="P36"><text:span text:style-name="T1">2.2 Actions automatisées (Post-installation)</text:span></text:p>
      <text:list xml:id="list767552555" text:style-name="WWNum2">
        <text:list-item>
          <text:p text:style-name="P21"><text:span text:style-name="T2">Secrets :</text:span><text:span text:style-name="T1"> Génération aléatoire de DB_PASS et JWT_SECRET (stockés dans /etc/trace-api.conf).</text:span></text:p>
        </text:list-item>
        <text:list-item>
          <text:p text:style-name="P21"><text:span text:style-name="T2">Base de données :</text:span><text:span text:style-name="T1"> Création de parc_mobilier et import des référentiels CSV.</text:span></text:p>
        </text:list-item>
        <text:list-item>
          <text:p text:style-name="P21"><text:span text:style-name="T2">SSL :</text:span><text:span text:style-name="T1"> Génération de certificats auto-signés dans /etc/ssl/trace/.</text:span></text:p>
        </text:list-item>
        <text:list-item>
          <text:p text:style-name="P21"><text:span text:style-name="T2">Securité :</text:span><text:span text:style-name="T1"> Configuration des prisons Fail2Ban et des zones de limitation Nginx.</text:span></text:p>
        </text:list-item>
        <text:list-item>
          <text:p text:style-name="P23"><text:span text:style-name="T2">Identifiants :</text:span><text:span text:style-name="T1"> Création du compte administrateur initial (admin@gouv.fr).</text:span></text:p>
        </text:list-item>
      </text:list>
      <text:p text:style-name="P34"><text:span text:style-name="T1">3. Stratégie de Sauvegarde et Restauration</text:span></text:p>
      <text:p text:style-name="P1"><text:span text:style-name="T1">La continuité des données est assurée par deux scripts dédiés situés dans /usr/local/bin/.</text:span></text:p>
      <text:p text:style-name="P36"><text:span text:style-name="T1">3.1 Sauvegarde Automatisée (trace_backup.sh)</text:span></text:p>
      <text:p text:style-name="P2"><text:span text:style-name="T1">Le script effectue un dump compressé (-Fc) et nettoie les fichiers de plus de 30 jours.</text:span></text:p>
      <text:list xml:id="list1575580147" text:style-name="WWNum3">
        <text:list-item>
          <text:p text:style-name="P5"><text:span text:style-name="T2">Point de montage :</text:span><text:span text:style-name="T1"> /mnt/savetrace</text:span></text:p>
        </text:list-item>
        <text:list-item>
          <text:p text:style-name="P5"><text:span text:style-name="T2">Planification (Crontab) :</text:span><text:span text:style-name="T1"> Exécuté tous les jours à 02h00 et 13h00 sous l'utilisateur </text:span><text:span text:style-name="T4">postgres</text:span><text:span text:style-name="T1">.</text:span></text:p>
        </text:list-item>
        <text:list-item>
          <text:p text:style-name="P17"><text:soft-page-break/><text:span text:style-name="T2">Lancement manuel :</text:span><text:span text:style-name="T5"><text:line-break/></text:span><text:span text:style-name="T1">sudo</text:span><text:span text:style-name="T4"> -u postgres</text:span><text:span text:style-name="T1"> /usr/local/bin/trace_backup.sh<text:line-break/><text:line-break/></text:span></text:p>
        </text:list-item>
      </text:list>
      <text:p text:style-name="P37"><text:span text:style-name="T1">3.2 Restauration Interactive (trace_restore.sh)</text:span></text:p>
      <text:p text:style-name="P2"><text:span text:style-name="T1">Un outil interactif permet de visualiser et de sélectionner une sauvegarde à restaurer.</text:span></text:p>
      <text:list xml:id="list1225051716" text:style-name="WWNum4">
        <text:list-item>
          <text:p text:style-name="P7"><text:span text:style-name="T2">Lancement :</text:span><text:span text:style-name="T5"><text:line-break/></text:span><text:span text:style-name="T1">sudo /usr/local/bin/trace_restore.sh<text:line-break/><text:line-break/></text:span></text:p>
        </text:list-item>
        <text:list-item>
          <text:p text:style-name="P7"><text:span text:style-name="T2">Fonctionnement :</text:span></text:p>
        </text:list-item>
      </text:list>
      <text:list xml:id="list3804602415" text:style-name="WWNum5">
        <text:list-item>
          <text:list>
            <text:list-item>
              <text:p text:style-name="P24"><text:span text:style-name="T1">Affiche la liste des fichiers .dump triés par date.</text:span></text:p>
            </text:list-item>
            <text:list-item>
              <text:p text:style-name="P24"><text:span text:style-name="T1">Demande une confirmation explicite (saisie de "OUI").</text:span></text:p>
            </text:list-item>
            <text:list-item>
              <text:p text:style-name="P24"><text:span text:style-name="T1">Termine les sessions actives sur la base de données pour permettre l'écrasement.</text:span></text:p>
            </text:list-item>
            <text:list-item>
              <text:p text:style-name="P26"><text:span text:style-name="T1">Restaure la structure et les données.</text:span></text:p>
            </text:list-item>
          </text:list>
        </text:list-item>
      </text:list>
      <text:p text:style-name="P34"><text:span text:style-name="T1">4. Sécurité et Protection Active</text:span></text:p>
      <text:p text:style-name="P36"><text:span text:style-name="T1">4.1 Gestion des bannissements (Fail2Ban)</text:span></text:p>
      <text:p text:style-name="P2"><text:span text:style-name="T1">Le système protège la route /api/rpc/login. Si une IP échoue 5 fois en 10 minutes, elle est bannie 1 heure.</text:span></text:p>
      <text:list xml:id="list1682308839" text:style-name="WWNum6">
        <text:list-item>
          <text:p text:style-name="P9"><text:span text:style-name="T2">Vérifier les IPs bannies :</text:span><text:span text:style-name="T5"><text:line-break/></text:span><text:span text:style-name="T1">sudo fail2ban-client status mobitrace-login<text:line-break/><text:line-break/></text:span></text:p>
        </text:list-item>
        <text:list-item>
          <text:p text:style-name="P18"><text:span text:style-name="T2">Débannir un utilisateur :</text:span><text:span text:style-name="T5"><text:line-break/></text:span><text:span text:style-name="T1">sudo fail2ban-client set mobitrace-login unbanip &lt;ADRESSE_IP&gt;<text:line-break/><text:line-break/></text:span></text:p>
        </text:list-item>
      </text:list>
      <text:p text:style-name="P37"><text:span text:style-name="T1">4.2 Audit et Traçabilité</text:span></text:p>
      <text:p text:style-name="P2"><text:span text:style-name="T1">Chaque modification (Mobilier, Catalogue, Administration) déclenche un trigger SQL qui enregistre :</text:span></text:p>
      <text:list xml:id="list2058993078" text:style-name="WWNum7">
        <text:list-item>
          <text:p text:style-name="P10"><text:span text:style-name="T1">L'auteur (Email)</text:span></text:p>
        </text:list-item>
        <text:list-item>
          <text:p text:style-name="P10"><text:span text:style-name="T2">L'adresse IP source</text:span><text:span text:style-name="T1"> (transmise par Nginx)</text:span></text:p>
        </text:list-item>
        <text:list-item>
          <text:p text:style-name="P19"><text:span text:style-name="T1">Le détail des champs modifiés (Ancienne vs Nouvelle valeur)</text:span></text:p>
        </text:list-item>
      </text:list>
      <text:p text:style-name="P27"><text:span text:style-name="T2">Purge des logs :</text:span><text:span text:style-name="T1"> Une tâche Cron (/etc/cron.d/trace_purge_logs) supprime quotidiennement les entrées d'audit de plus de 3 mois pour optimiser les performances.</text:span></text:p>
      <text:p text:style-name="P33"><text:span text:style-name="T1">5. Maintenance et Diagnostic</text:span></text:p>
      <text:p text:style-name="P36"><text:span text:style-name="T1">5.1 Gestion des services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8"><text:span text:style-name="T2">Service</text:span></text:p>
          </table:table-cell>
          <table:table-cell table:style-name="Table1.A1" office:value-type="string">
            <text:p text:style-name="P28"><text:span text:style-name="T2">Commande de redémarrage</text:span></text:p>
          </table:table-cell>
          <table:table-cell table:style-name="Table1.A1" office:value-type="string">
            <text:p text:style-name="P28"><text:span text:style-name="T2">Usage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2">Nginx</text:span></text:p>
          </table:table-cell>
          <table:table-cell table:style-name="Table1.A1" office:value-type="string">
            <text:p text:style-name="P29"><text:span text:style-name="T1">systemctl restart nginx</text:span></text:p>
          </table:table-cell>
          <table:table-cell table:style-name="Table1.A1" office:value-type="string">
            <text:p text:style-name="P29"><text:span text:style-name="T1">Modification de la config SSL ou Proxy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2">PostgREST</text:span></text:p>
          </table:table-cell>
          <table:table-cell table:style-name="Table1.A1" office:value-type="string">
            <text:p text:style-name="P29"><text:span text:style-name="T1">systemctl restart trace-api</text:span></text:p>
          </table:table-cell>
          <table:table-cell table:style-name="Table1.A1" office:value-type="string">
            <text:p text:style-name="P29"><text:span text:style-name="T1">Prise en compte de nouveaux GRANTS SQL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2">Fail2Ban</text:span></text:p>
          </table:table-cell>
          <table:table-cell table:style-name="Table1.A1" office:value-type="string">
            <text:p text:style-name="P29"><text:span text:style-name="T1">systemctl restart fail2ban</text:span></text:p>
          </table:table-cell>
          <table:table-cell table:style-name="Table1.A1" office:value-type="string">
            <text:p text:style-name="P29"><text:span text:style-name="T1">Mise à jour des règles de filtrage</text:span></text:p>
          </table:table-cell>
        </table:table-row>
      </table:table>
      <text:p text:style-name="P38"><text:soft-page-break/><text:span text:style-name="T1">5.2 Analyse des journaux</text:span></text:p>
      <text:list xml:id="list3688368161" text:style-name="WWNum8">
        <text:list-item>
          <text:p text:style-name="P12"><text:span text:style-name="T2">Logs d'accès web :</text:span><text:span text:style-name="T1"> /var/log/nginx/access.log (Utile pour voir les codes 400/401).</text:span></text:p>
        </text:list-item>
        <text:list-item>
          <text:p text:style-name="P12"><text:span text:style-name="T2">Logs d'erreurs API :</text:span><text:span text:style-name="T1"> journalctl -u trace-api -f</text:span></text:p>
        </text:list-item>
        <text:list-item>
          <text:p text:style-name="P20"><text:span text:style-name="T2">Logs de sécurité :</text:span><text:span text:style-name="T1"> /var/log/fail2ban.log</text:span></text:p>
        </text:list-item>
      </text:list>
      <text:p text:style-name="P34"><text:span text:style-name="T1">6. Procédure de Désinstallation</text:span></text:p>
      <text:list xml:id="list3923110967" text:style-name="WWNum9">
        <text:list-item>
          <text:p text:style-name="P14"><text:span text:style-name="T2">Suppression simple :</text:span><text:span text:style-name="T1"> sudo apt remove trace-server (conserve la base de données).</text:span></text:p>
        </text:list-item>
        <text:list-item>
          <text:p text:style-name="P14"><text:span text:style-name="T2">Purge complète :</text:span><text:span text:style-name="T1"> sudo apt purge trace-server</text:span></text:p>
        </text:list-item>
      </text:list>
      <text:list xml:id="list1652415270" text:style-name="WWNum10">
        <text:list-item>
          <text:list>
            <text:list-item>
              <text:p text:style-name="P30"><text:span text:style-name="T3">Supprime la base de données PostgreSQL.</text:span></text:p>
            </text:list-item>
            <text:list-item>
              <text:p text:style-name="P30"><text:span text:style-name="T3">Supprime les certificats SSL.</text:span></text:p>
            </text:list-item>
            <text:list-item>
              <text:p text:style-name="P30"><text:span text:style-name="T3">Nettoie les configurations Fail2Ban et Nginx.</text:span></text:p>
            </text:list-item>
            <text:list-item>
              <text:p text:style-name="P32"><text:span text:style-name="T3">Note : Les sauvegardes dans /mnt/savetrace sont conservées par sécurité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6146in"/>
        </style:list-level-properties>
      </text:list-level-style-number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25in" fo:margin-left="0.6146in"/>
        </style:list-level-properties>
      </text:list-level-style-number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70" meta:word-count="578" meta:character-count="3899" meta:non-whitespace-character-count="3413"/>
    <meta:generator>LibreOfficeDev/6.0.5.2$Linux_X86_64 LibreOffice_project/</meta:generator>
  </office:meta>
</office:document-meta>
</file>